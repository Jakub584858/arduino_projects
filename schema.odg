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DB4000009B0A65BD1C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frame draw:style-name="gr1" draw:text-style-name="P1" draw:layer="layout" svg:width="26.874cm" svg:height="18.999cm" svg:x="1.435cm" svg:y="1cm">
          <draw:image xlink:href="Pictures/1000000100000DB4000009B0A65BD1C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Wypełninone_20_niebieskim" draw:display-name="Wypełninone niebieskim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Wypełnione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Wypełnione_20_czerwonym" draw:display-name="Wypełnione czerwonym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Wypełnione_20_zielonym" draw:display-name="Wypełnione zielonym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Wypełnione_20_żółtym" draw:display-name="Wypełnione żółtym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3T15:57:01.077012640</meta:creation-date>
    <dc:date>2026-04-15T17:19:16.080356426</dc:date>
    <meta:editing-duration>PT50M5S</meta:editing-duration>
    <meta:editing-cycles>6</meta:editing-cycles>
    <meta:generator>LibreOffice/26.2.2.2$Linux_X86_64 LibreOffice_project/620$Build-2</meta:generator>
    <meta:document-statistic meta:object-count="1"/>
  </office:meta>
</office:document-meta>
</file>